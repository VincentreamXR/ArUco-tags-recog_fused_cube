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50000029573ECC40C85FAD800.png" manifest:media-type="image/png"/>
  <manifest:file-entry manifest:full-path="Pictures/100017E0000115720000F24AE1285BDF1BF78ACE.svg" manifest:media-type="image/svg+xml"/>
  <manifest:file-entry manifest:full-path="Pictures/10000001000002F500000295767E043BB54E630F.png" manifest:media-type="image/png"/>
  <manifest:file-entry manifest:full-path="Pictures/100017E0000115720000F24ACAAFE6C7F89AFF6D.svg" manifest:media-type="image/svg+xml"/>
  <manifest:file-entry manifest:full-path="Pictures/10000001000002F5000002951FCB1D066FD822DF.png" manifest:media-type="image/png"/>
  <manifest:file-entry manifest:full-path="Pictures/10000001000002F50000029550C4D469A77F6C1E.png" manifest:media-type="image/png"/>
  <manifest:file-entry manifest:full-path="Pictures/100017E0000115720000F24A83973E98BE653ECB.svg" manifest:media-type="image/svg+xml"/>
  <manifest:file-entry manifest:full-path="Pictures/100017E0000115720000F24AB668142D842DD179.svg" manifest:media-type="image/svg+xml"/>
  <manifest:file-entry manifest:full-path="Pictures/100017E0000115720000F24AFF50CC72C2D210DF.svg" manifest:media-type="image/svg+xml"/>
  <manifest:file-entry manifest:full-path="Pictures/10000001000002F50000029588CF0FE82D8FA031.png" manifest:media-type="image/png"/>
  <manifest:file-entry manifest:full-path="Pictures/10000001000002F5000002958DFEADF8F75BEBC5.png" manifest:media-type="image/png"/>
  <manifest:file-entry manifest:full-path="Pictures/10000001000002F5000002953214D680929429E9.png" manifest:media-type="image/png"/>
  <manifest:file-entry manifest:full-path="Pictures/10000001000002F500000295AA988CE9C7D6E49C.png" manifest:media-type="image/png"/>
  <manifest:file-entry manifest:full-path="Pictures/100017E0000115720000F24A1EE9DC6182AB2E2C.svg" manifest:media-type="image/svg+xml"/>
  <manifest:file-entry manifest:full-path="Pictures/100017E0000115720000F24A2B16F6D4B8E3C19E.svg" manifest:media-type="image/svg+xml"/>
  <manifest:file-entry manifest:full-path="Pictures/100017E0000115720000F24A57D1043EC454EF8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图像1" text:anchor-type="char" svg:width="17cm" svg:height="14.845cm" draw:z-index="0"><draw:image xlink:href="Pictures/100017E0000115720000F24AB668142D842DD179.svg" xlink:type="simple" xlink:show="embed" xlink:actuate="onLoad" draw:mime-type="image/svg+xml"/><draw:image xlink:href="Pictures/10000001000002F5000002958DFEADF8F75BEBC5.png" xlink:type="simple" xlink:show="embed" xlink:actuate="onLoad" draw:mime-type="image/png"/></draw:frame><draw:frame draw:style-name="fr2" draw:name="图像2" text:anchor-type="char" svg:width="17cm" svg:height="14.845cm" draw:z-index="1"><draw:image xlink:href="Pictures/100017E0000115720000F24ACAAFE6C7F89AFF6D.svg" xlink:type="simple" xlink:show="embed" xlink:actuate="onLoad" draw:mime-type="image/svg+xml"/><draw:image xlink:href="Pictures/10000001000002F5000002951FCB1D066FD822DF.png" xlink:type="simple" xlink:show="embed" xlink:actuate="onLoad" draw:mime-type="image/png"/></draw:frame><draw:frame draw:style-name="fr2" draw:name="图像3" text:anchor-type="char" svg:width="17cm" svg:height="14.845cm" draw:z-index="2"><draw:image xlink:href="Pictures/100017E0000115720000F24A1EE9DC6182AB2E2C.svg" xlink:type="simple" xlink:show="embed" xlink:actuate="onLoad" draw:mime-type="image/svg+xml"/><draw:image xlink:href="Pictures/10000001000002F50000029588CF0FE82D8FA031.png" xlink:type="simple" xlink:show="embed" xlink:actuate="onLoad" draw:mime-type="image/png"/></draw:frame><draw:frame draw:style-name="fr2" draw:name="图像4" text:anchor-type="char" svg:width="17cm" svg:height="14.845cm" draw:z-index="3"><draw:image xlink:href="Pictures/100017E0000115720000F24AFF50CC72C2D210DF.svg" xlink:type="simple" xlink:show="embed" xlink:actuate="onLoad" draw:mime-type="image/svg+xml"/><draw:image xlink:href="Pictures/10000001000002F5000002953214D680929429E9.png" xlink:type="simple" xlink:show="embed" xlink:actuate="onLoad" draw:mime-type="image/png"/></draw:frame><draw:frame draw:style-name="fr2" draw:name="图像5" text:anchor-type="char" svg:width="17cm" svg:height="14.845cm" draw:z-index="4"><draw:image xlink:href="Pictures/100017E0000115720000F24A2B16F6D4B8E3C19E.svg" xlink:type="simple" xlink:show="embed" xlink:actuate="onLoad" draw:mime-type="image/svg+xml"/><draw:image xlink:href="Pictures/10000001000002F500000295AA988CE9C7D6E49C.png" xlink:type="simple" xlink:show="embed" xlink:actuate="onLoad" draw:mime-type="image/png"/></draw:frame><draw:frame draw:style-name="fr2" draw:name="图像6" text:anchor-type="char" svg:width="17cm" svg:height="14.845cm" draw:z-index="5"><draw:image xlink:href="Pictures/100017E0000115720000F24A57D1043EC454EF8A.svg" xlink:type="simple" xlink:show="embed" xlink:actuate="onLoad" draw:mime-type="image/svg+xml"/><draw:image xlink:href="Pictures/10000001000002F50000029550C4D469A77F6C1E.png" xlink:type="simple" xlink:show="embed" xlink:actuate="onLoad" draw:mime-type="image/png"/></draw:frame><draw:frame draw:style-name="fr1" draw:name="图像7" text:anchor-type="char" svg:x="3.886cm" svg:y="21.742cm" svg:width="4.001cm" svg:height="3.491cm" draw:z-index="6"><draw:image xlink:href="Pictures/100017E0000115720000F24A83973E98BE653ECB.svg" xlink:type="simple" xlink:show="embed" xlink:actuate="onLoad" draw:mime-type="image/svg+xml"/><draw:image xlink:href="Pictures/10000001000002F500000295767E043BB54E630F.png" xlink:type="simple" xlink:show="embed" xlink:actuate="onLoad" draw:mime-type="image/png"/></draw:frame><draw:frame draw:style-name="fr1" draw:name="图像8" text:anchor-type="char" svg:x="-0.46cm" svg:y="21.781cm" svg:width="4.001cm" svg:height="3.491cm" draw:z-index="7"><draw:image xlink:href="Pictures/100017E0000115720000F24AE1285BDF1BF78ACE.svg" xlink:type="simple" xlink:show="embed" xlink:actuate="onLoad" draw:mime-type="image/svg+xml"/><draw:image xlink:href="Pictures/10000001000002F50000029573ECC40C85FAD8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8:59:58.024173945</meta:creation-date>
    <dc:date>2026-06-08T19:01:42.288884618</dc:date>
    <meta:editing-duration>PT1M44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