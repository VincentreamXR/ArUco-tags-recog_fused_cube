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430" officeooo:paragraph-rsid="00051430"/>
    </style:style>
    <style:style style:name="P2" style:family="paragraph" style:parent-style-name="Standard">
      <style:text-properties officeooo:rsid="00064ad6" officeooo:paragraph-rsid="00064ad6"/>
    </style:style>
    <style:style style:name="T1" style:family="text">
      <style:text-properties officeooo:rsid="00051430"/>
    </style:style>
    <style:style style:name="T2" style:family="text">
      <style:text-properties officeooo:rsid="00064a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deeparuco</text:p>
      <text:p text:style-name="Standard"/>
      <text:p text:style-name="Standard"><text:s/>/usr/bin/python3 /home/zsyy/桌面/JuMarker/detect_deeparuco_tags_cam.py \</text:p>
      <text:p text:style-name="Standard"><text:s text:c="4"/>--camera 0 \</text:p>
      <text:p text:style-name="Standard"><text:s text:c="4"/>--dictionary DICT_6X6_250 \</text:p>
      <text:p text:style-name="Standard"><text:s text:c="4"/>--calibration /home/zsyy/桌面/JuMarker/utils/camera_calibration.yml \</text:p>
      <text:p text:style-name="Standard"><text:s text:c="4"/>--marker-length 0.04</text:p>
      <text:p text:style-name="Standard"/>
      <text:p text:style-name="Standard"/>
      <text:p text:style-name="Standard">[ WARN:0] OpenCV | GStreamer warning: Cannot query video position: status=0, value=-1, duration=-1</text:p>
      <text:p text:style-name="Standard">[ WARN:0] OpenCV | GStreamer warning: GStreamer: unhandled property</text:p>
      <text:p text:style-name="Standard">[ WARN:0] OpenCV | GStreamer warning: GStreamer: unhandled property</text:p>
      <text:p text:style-name="Standard">OpenCV: 3.4.14</text:p>
      <text:p text:style-name="Standard">Camera: live:0 requested=1280x720 autofocus=1</text:p>
      <text:p text:style-name="Standard">Tag dictionary: DICT_6X6_250 marker_length=0.04</text:p>
      <text:p text:style-name="Standard">Press ESC or q to quit.</text:p>
      <text:p text:style-name="Standard"/>
      <text:p text:style-name="Standard"/>
      <text:p text:style-name="Standard"/>
      <text:p text:style-name="Standard"/>
      <text:p text:style-name="P2">puzzlepole</text:p>
      <text:p text:style-name="Standard"/>
      <text:p text:style-name="Standard"><text:s text:c="2"/>/usr/bin/python3 /home/zsyy/桌面/JuMarker/detect_puzzlepole_cam.py \</text:p>
      <text:p text:style-name="Standard"><text:s text:c="4"/>--camera 0 \</text:p>
      <text:p text:style-name="Standard"><text:s text:c="4"/>--period 12 \</text:p>
      <text:p text:style-name="Standard"/>
      <text:p text:style-name="Standard"/>
      <text:p text:style-name="Standard"/>
      <text:p text:style-name="Standard">deep<text:span text:style-name="T1">aruco++</text:span></text:p>
      <text:p text:style-name="Standard"/>
      <text:p text:style-name="Standard">conda run -n deeparuco39 python /home/zsyy/桌面/JuMarker/detect_deeparuco_cam.py \</text:p>
      <text:p text:style-name="Standard"><text:s text:c="4"/>--repo /home/zsyy/下载/deeparuco-main \</text:p>
      <text:p text:style-name="Standard"><text:s text:c="4"/>--camera 0 \</text:p>
      <text:p text:style-name="Standard"/>
      <text:p text:style-name="Standard"><text:s text:c="4"/>--fallback-opencv</text:p>
      <text:p text:style-name="Standard"/>
      <text:p text:style-name="Standard"/>
      <text:p text:style-name="Standard"/>
      <text:p text:style-name="Standard">ju<text:span text:style-name="T2">marker</text:span></text:p>
      <text:p text:style-name="Standard"/>
      <text:p text:style-name="Standard"><text:s text:c="2"/>python3 /home/zsyy/桌面/JuMarker/detect_jumarker_cam.py \</text:p>
      <text:p text:style-name="Standard"><text:s text:c="4"/>--project /home/zsyy/桌面/JuMarker \</text:p>
      <text:p text:style-name="Standard"><text:s text:c="4"/>--camera 0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8T11:55:26.057269732</meta:creation-date>
    <dc:date>2026-06-08T15:45:50.140865234</dc:date>
    <meta:editing-duration>PT3H10M1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128" meta:character-count="980" meta:non-whitespace-character-count="861"/>
  </office:meta>
</office:document-meta>
</file>