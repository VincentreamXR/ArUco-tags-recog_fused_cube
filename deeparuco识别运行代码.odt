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9e42"/>
    </style:style>
    <style:style style:name="P2" style:family="paragraph" style:parent-style-name="Standard">
      <style:text-properties officeooo:paragraph-rsid="0008c8f5"/>
    </style:style>
    <style:style style:name="P3" style:family="paragraph" style:parent-style-name="Standard">
      <style:text-properties officeooo:rsid="000c5fdd" officeooo:paragraph-rsid="000c5fdd"/>
    </style:style>
    <style:style style:name="T1" style:family="text">
      <style:text-properties officeooo:rsid="00049e42"/>
    </style:style>
    <style:style style:name="T2" style:family="text">
      <style:text-properties officeooo:rsid="0008c8f5"/>
    </style:style>
    <style:style style:name="T3" style:family="text">
      <style:text-properties officeooo:rsid="000c5f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uco运行代码</text:p>
      <text:p text:style-name="Standard">/home/zsyy/anaconda3/envs/deeparuco39/bin/python '/home/zsyy/桌面/aruco_fusedpose.py' \</text:p>
      <text:p text:style-name="Standard"><text:s text:c="4"/>--camera 0 \</text:p>
      <text:p text:style-name="Standard"><text:s text:c="4"/>--width 640 \</text:p>
      <text:p text:style-name="Standard"><text:s text:c="4"/>--height 480 \</text:p>
      <text:p text:style-name="Standard"><text:s text:c="4"/>--send-unity-pose \</text:p>
      <text:p text:style-name="Standard"><text:s text:c="4"/>--unity-udp-host 127.0.0.1 \</text:p>
      <text:p text:style-name="Standard"><text:s text:c="4"/>--unity-udp-port 5055</text:p>
      <text:p text:style-name="Standard"/>
      <text:p text:style-name="P3">Deeparuco运行代码</text:p>
      <text:p text:style-name="Standard"/>
      <text:p text:style-name="Standard">/home/zsyy/anaconda3/envs/deeparuco39/bin/python '/home/zsyy/桌面/deeparuco_fusedpose.py'</text:p>
      <text:p text:style-name="Standard"/>
      <text:p text:style-name="P3">DeepAruco++运行代码</text:p>
      <text:p text:style-name="P1">/home/zsyy/anaconda3/envs/deeparuco39/bin/python '/home/zsyy/桌面/deeparuco<text:span text:style-name="T1">++</text:span>_fusedpose.py'</text:p>
      <text:p text:style-name="P1"/>
      <text:p text:style-name="P1"/>
      <text:p text:style-name="P1">python3 Tools/aruco_fusedpose.py \</text:p>
      <text:p text:style-name="P1"><text:s text:c="4"/>--camera auto \</text:p>
      <text:p text:style-name="P1"><text:s text:c="4"/>--send-unity-pose \</text:p>
      <text:p text:style-name="P1"><text:s text:c="4"/>--unity-udp-host 127.0.0.1 \</text:p>
      <text:p text:style-name="P1"><text:s text:c="4"/>--unity-udp-port 5055 \</text:p>
      <text:p text:style-name="P1"><text:s text:c="4"/>--top-id 0 \</text:p>
      <text:p text:style-name="P1"><text:s text:c="4"/>--upper-ids 1,2,3,4 \</text:p>
      <text:p text:style-name="P1"><text:s text:c="4"/>--lower-ids 5,6,7,8 \</text:p>
      <text:p text:style-name="P1"><text:s text:c="4"/>--upper-rotation-deg 0 \</text:p>
      <text:p text:style-name="P1"><text:s text:c="4"/>--lower-rotation-deg 0</text:p>
      <text:p text:style-name="P1"/>
      <text:p text:style-name="P1">OpenCV: 4.7.0</text:p>
      <text:p text:style-name="P1">Camera: live:0 requested=640x480@30.0fps autofocus=1 buffer=1 async_capture=on actual=640x480@30.0fps fourcc=MJPG buffer=1</text:p>
      <text:p text:style-name="P1">Camera scan candidates: [0]</text:p>
      <text:p text:style-name="P1">Model: 9-tag cube stack 0.040x0.080x0.040m, side ids [0-7], top id 0, iterative PnP</text:p>
      <text:p text:style-name="P1">Calibration: approximate from frame size. Use --calibration for metric pose.</text:p>
      <text:p text:style-name="P1">Press ESC or q to quit.</text:p>
      <text:p text:style-name="P1">Unity pose UDP: 127.0.0.1:5055</text:p>
      <text:p text:style-name="P1"/>
      <text:p text:style-name="P1"><text:span text:style-name="T3"><text:s/>UDP</text:span>传送<text:span text:style-name="T3">Unity</text:span></text:p>
      <text:p text:style-name="P1">python3 Tools/aruco_fusedpose.py \</text:p>
      <text:p text:style-name="P1"><text:s text:c="4"/>--camera auto \</text:p>
      <text:p text:style-name="P1"><text:s text:c="4"/>--send-unity-pose \</text:p>
      <text:p text:style-name="P2"><text:s text:c="4"/>--unity-udp-host <text:span text:style-name="T2">10.40.92.155</text:span>\</text:p>
      <text:p text:style-name="P1"><text:s text:c="4"/>--unity-udp-port 5055 \</text:p>
      <text:p text:style-name="P1"><text:s text:c="4"/>--top-id 0 \</text:p>
      <text:p text:style-name="P1"><text:s text:c="4"/>--upper-ids 1,2,3,4 \</text:p>
      <text:p text:style-name="P1"><text:s text:c="4"/>--lower-ids 5,6,7,8 \</text:p>
      <text:p text:style-name="P1"><text:s text:c="4"/>--print-pose \ </text:p>
      <text:p text:style-name="P1"><text:s text:c="4"/>--upper-rotation-deg 0 \</text:p>
      <text:p text:style-name="P1"><text:s text:c="4"/>--lower-rotation-deg 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2T14:44:40.959994892</meta:creation-date>
    <dc:date>2026-06-29T17:08:30.082855817</dc:date>
    <meta:editing-duration>PT24M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41" meta:word-count="182" meta:character-count="1345" meta:non-whitespace-character-count="1152"/>
  </office:meta>
</office:document-meta>
</file>