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3E8140CB8BEF94AC61D.png" manifest:media-type="image/png"/>
  <manifest:file-entry manifest:full-path="Pictures/10000001000003E8000003E85C9B4235914E012A.png" manifest:media-type="image/png"/>
  <manifest:file-entry manifest:full-path="Pictures/10000001000003E8000003E81BF7B7C00DF6824D.png" manifest:media-type="image/png"/>
  <manifest:file-entry manifest:full-path="Pictures/10000001000003E8000003E836439F14386556CB.png" manifest:media-type="image/png"/>
  <manifest:file-entry manifest:full-path="Pictures/10000001000003E8000003E8F50AF81C881F87B6.png" manifest:media-type="image/png"/>
  <manifest:file-entry manifest:full-path="Pictures/10000001000003E8000003E812C3057BD7CC5291.png" manifest:media-type="image/png"/>
  <manifest:file-entry manifest:full-path="Pictures/10000001000003E8000003E8A8690B6943F75917.png" manifest:media-type="image/png"/>
  <manifest:file-entry manifest:full-path="Pictures/10000001000003E8000003E8AD4B563FBF7A5B3D.png" manifest:media-type="image/png"/>
  <manifest:file-entry manifest:full-path="Pictures/10000001000003E8000003E832429FF8D4D868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图像1" text:anchor-type="char" svg:x="1.242cm" svg:y="0.247cm" svg:width="4.001cm" svg:height="4.001cm" draw:z-index="0"><draw:image xlink:href="Pictures/10000001000003E8000003E832429FF8D4D86818.png" xlink:type="simple" xlink:show="embed" xlink:actuate="onLoad" draw:mime-type="image/png"/></draw:frame><draw:frame draw:style-name="fr1" draw:name="图像2" text:anchor-type="char" svg:x="6.218cm" svg:y="0.247cm" svg:width="4.001cm" svg:height="4.001cm" draw:z-index="1"><draw:image xlink:href="Pictures/10000001000003E8000003E8A8690B6943F75917.png" xlink:type="simple" xlink:show="embed" xlink:actuate="onLoad" draw:mime-type="image/png"/></draw:frame><draw:frame draw:style-name="fr1" draw:name="图像3" text:anchor-type="char" svg:x="11.578cm" svg:y="0.15cm" svg:width="4.001cm" svg:height="4.001cm" draw:z-index="2"><draw:image xlink:href="Pictures/10000001000003E8000003E81BF7B7C00DF6824D.png" xlink:type="simple" xlink:show="embed" xlink:actuate="onLoad" draw:mime-type="image/png"/></draw:frame><draw:frame draw:style-name="fr1" draw:name="图像4" text:anchor-type="char" svg:x="1.258cm" svg:y="5.424cm" svg:width="4.001cm" svg:height="4.001cm" draw:z-index="3"><draw:image xlink:href="Pictures/10000001000003E8000003E85C9B4235914E012A.png" xlink:type="simple" xlink:show="embed" xlink:actuate="onLoad" draw:mime-type="image/png"/></draw:frame><draw:frame draw:style-name="fr1" draw:name="图像5" text:anchor-type="char" svg:x="6.385cm" svg:y="5.392cm" svg:width="4.001cm" svg:height="4.001cm" draw:z-index="4"><draw:image xlink:href="Pictures/10000001000003E8000003E812C3057BD7CC5291.png" xlink:type="simple" xlink:show="embed" xlink:actuate="onLoad" draw:mime-type="image/png"/></draw:frame><draw:frame draw:style-name="fr1" draw:name="图像6" text:anchor-type="char" svg:x="11.691cm" svg:y="5.39cm" svg:width="4.001cm" svg:height="4.001cm" draw:z-index="5"><draw:image xlink:href="Pictures/10000001000003E8000003E8140CB8BEF94AC61D.png" xlink:type="simple" xlink:show="embed" xlink:actuate="onLoad" draw:mime-type="image/png"/></draw:frame><text:s text:c="41"/><draw:frame draw:style-name="fr1" draw:name="图像7" text:anchor-type="char" svg:x="1.321cm" svg:y="10.546cm" svg:width="4.001cm" svg:height="4.001cm" draw:z-index="6"><draw:image xlink:href="Pictures/10000001000003E8000003E8F50AF81C881F87B6.png" xlink:type="simple" xlink:show="embed" xlink:actuate="onLoad" draw:mime-type="image/png"/></draw:frame><draw:frame draw:style-name="fr1" draw:name="图像8" text:anchor-type="char" svg:x="6.533cm" svg:y="10.502cm" svg:width="4.001cm" svg:height="4.001cm" draw:z-index="7"><draw:image xlink:href="Pictures/10000001000003E8000003E8AD4B563FBF7A5B3D.png" xlink:type="simple" xlink:show="embed" xlink:actuate="onLoad" draw:mime-type="image/png"/></draw:frame><draw:frame draw:style-name="fr1" draw:name="图像9" text:anchor-type="char" svg:x="11.725cm" svg:y="10.599cm" svg:width="4.001cm" svg:height="4.001cm" draw:z-index="8"><draw:image xlink:href="Pictures/10000001000003E8000003E836439F14386556CB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11:13:21.217519576</meta:creation-date>
    <dc:date>2026-06-22T11:19:48.020877935</dc:date>
    <meta:editing-duration>PT5M40S</meta:editing-duration>
    <meta:editing-cycles>2</meta:editing-cycles>
    <meta:generator>LibreOffice/7.3.7.2$Linux_X86_64 LibreOffice_project/30$Build-2</meta:generator>
    <meta:print-date>2026-06-22T11:19:43.897413395</meta:print-date>
    <meta:document-statistic meta:table-count="0" meta:image-count="9" meta:object-count="0" meta:page-count="1" meta:paragraph-count="1" meta:word-count="0" meta:character-count="42" meta:non-whitespace-character-count="0"/>
  </office:meta>
</office:document-meta>
</file>